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iri" svg:font-family="Amiri" style:font-pitch="variable"/>
    <style:font-face style:name="Amiri Quran" svg:font-family="'Amiri Quran'" style:font-pitch="variable"/>
    <style:font-face style:name="C059" svg:font-family="C059" style:font-pitch="variable"/>
    <style:font-face style:name="Gentium" svg:font-family="Gent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rbitron SemiBold" svg:font-family="'Orbitron SemiBold'" style:font-pitch="variable"/>
    <style:font-face style:name="P052" svg:font-family="P052" style:font-pitch="variable"/>
    <style:font-face style:name="Share Tech Mono" svg:font-family="'Share Tech Mono'" style:font-pitch="variable"/>
    <style:font-face style:name="VT323" svg:font-family="VT323" style:font-pitch="fixed"/>
  </office:font-face-decls>
  <office:automatic-styles>
    <style:style style:name="P1" style:family="paragraph" style:parent-style-name="Heading_20_1">
      <style:paragraph-properties fo:text-align="justify" style:justify-single-word="false" fo:break-before="page"/>
      <style:text-properties style:font-name="Share Tech Mono" fo:font-size="16pt" fo:font-weight="bold" officeooo:rsid="00152e6c" officeooo:paragraph-rsid="00152e6c" style:font-size-asian="16pt" style:font-weight-asian="bold" style:font-size-complex="16pt" style:font-weight-complex="bold"/>
    </style:style>
    <style:style style:name="P2" style:family="paragraph" style:parent-style-name="Heading_20_3">
      <style:paragraph-properties fo:text-align="start" style:justify-single-word="false" fo:break-before="page"/>
      <style:text-properties style:font-name="Share Tech Mono" fo:font-size="16pt" officeooo:paragraph-rsid="00152e6c" style:font-size-asian="16pt" style:font-size-complex="16pt"/>
    </style:style>
    <style:style style:name="P3" style:family="paragraph" style:parent-style-name="Quotations">
      <style:text-properties style:font-name="Share Tech Mono" fo:font-size="16pt" style:font-size-asian="16pt" style:font-size-complex="16pt"/>
    </style:style>
    <style:style style:name="P4" style:family="paragraph" style:parent-style-name="Quotations">
      <style:paragraph-properties fo:text-align="start" style:justify-single-word="false"/>
      <style:text-properties style:font-name="Share Tech Mono" fo:font-size="16pt" style:font-size-asian="16pt" style:font-size-complex="16pt"/>
    </style:style>
    <style:style style:name="P5" style:family="paragraph" style:parent-style-name="Quotations" style:list-style-name="L2">
      <style:paragraph-properties fo:text-align="start" style:justify-single-word="false"/>
      <style:text-properties style:font-name="Share Tech Mono" fo:font-size="16pt" officeooo:paragraph-rsid="0017e844" style:font-size-asian="16pt" style:font-size-complex="16pt"/>
    </style:style>
    <style:style style:name="P6" style:family="paragraph" style:parent-style-name="Quotations" style:list-style-name="L2">
      <style:paragraph-properties fo:text-align="start" style:justify-single-word="false"/>
      <style:text-properties style:font-name="Share Tech Mono" fo:font-size="16pt" style:font-size-asian="16pt" style:font-size-complex="16pt"/>
    </style:style>
    <style:style style:name="P7" style:family="paragraph" style:parent-style-name="Quotations">
      <style:paragraph-properties fo:text-align="start" style:justify-single-word="false" fo:break-before="page"/>
      <style:text-properties style:font-name="Share Tech Mono" fo:font-size="16pt" style:font-size-asian="16pt" style:font-size-complex="16pt"/>
    </style:style>
    <style:style style:name="P8" style:family="paragraph" style:parent-style-name="Standard">
      <style:paragraph-properties fo:text-align="center" style:justify-single-word="false"/>
      <style:text-properties style:font-name="Share Tech Mono" fo:font-size="16pt" officeooo:rsid="00152e6c" officeooo:paragraph-rsid="00152e6c" style:font-size-asian="16pt" style:font-size-complex="16pt"/>
    </style:style>
    <style:style style:name="P9" style:family="paragraph" style:parent-style-name="Standard">
      <style:paragraph-properties fo:text-align="justify" style:justify-single-word="false"/>
      <style:text-properties style:font-name="Share Tech Mono" fo:font-size="16pt" fo:font-weight="bold" officeooo:rsid="00152e6c" officeooo:paragraph-rsid="00152e6c"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Share Tech Mono" fo:font-size="40pt" fo:font-weight="bold" officeooo:rsid="00152e6c" officeooo:paragraph-rsid="00152e6c" style:font-size-asian="40pt" style:font-weight-asian="bold" style:font-size-complex="40pt" style:font-weight-complex="bold"/>
    </style:style>
    <style:style style:name="P11" style:family="paragraph" style:parent-style-name="Standard">
      <style:paragraph-properties fo:text-align="center" style:justify-single-word="false"/>
      <style:text-properties style:font-name="Share Tech Mono" fo:font-size="21pt" officeooo:rsid="00152e6c" officeooo:paragraph-rsid="00152e6c" style:font-size-asian="21pt" style:font-size-complex="21pt"/>
    </style:style>
    <style:style style:name="P12" style:family="paragraph" style:parent-style-name="Standard">
      <style:paragraph-properties fo:text-align="justify" style:justify-single-word="false"/>
      <style:text-properties style:font-name="VT323" fo:font-size="16pt" fo:font-weight="bold" officeooo:rsid="00152e6c" officeooo:paragraph-rsid="00152e6c" style:font-size-asian="16pt" style:font-weight-asian="bold" style:font-size-complex="16pt" style:font-weight-complex="bold"/>
    </style:style>
    <style:style style:name="P13" style:family="paragraph" style:parent-style-name="Standard">
      <style:paragraph-properties fo:text-align="center" style:justify-single-word="false" fo:break-before="page"/>
      <style:text-properties style:font-name="VT323" fo:font-size="16pt" fo:font-weight="bold" officeooo:rsid="00152e6c" officeooo:paragraph-rsid="00152e6c"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VT323" fo:font-size="16pt" fo:font-weight="bold" officeooo:rsid="00152e6c" officeooo:paragraph-rsid="00152e6c" style:font-size-asian="16pt" style:font-weight-asian="bold" style:font-size-complex="16pt" style:font-weight-complex="bold"/>
    </style:style>
    <style:style style:name="P15" style:family="paragraph" style:parent-style-name="Text_20_body">
      <style:text-properties style:font-name="Share Tech Mono" fo:font-size="16pt" style:font-size-asian="16pt" style:font-size-complex="16pt"/>
    </style:style>
    <style:style style:name="P16" style:family="paragraph" style:parent-style-name="Text_20_body" style:list-style-name="L1">
      <style:text-properties style:font-name="Share Tech Mono" fo:font-size="16pt" style:font-size-asian="16pt" style:font-size-complex="16pt"/>
    </style:style>
    <style:style style:name="P17" style:family="paragraph" style:parent-style-name="Text_20_body">
      <style:paragraph-properties fo:text-align="start" style:justify-single-word="false"/>
      <style:text-properties style:font-name="Share Tech Mono" fo:font-size="16pt" officeooo:paragraph-rsid="00152e6c" style:font-size-asian="16pt" style:font-size-complex="16pt"/>
    </style:style>
    <style:style style:name="P18" style:family="paragraph" style:parent-style-name="Text_20_body">
      <style:paragraph-properties fo:text-align="center" style:justify-single-word="false"/>
      <style:text-properties style:font-name="VT323" fo:font-size="16pt" officeooo:paragraph-rsid="00152e6c" style:font-size-asian="16pt" style:font-size-complex="16pt"/>
    </style:style>
    <style:style style:name="P19" style:family="paragraph" style:parent-style-name="Text_20_body">
      <style:paragraph-properties fo:text-align="center" style:justify-single-word="false"/>
      <style:text-properties style:font-name="VT323" fo:font-size="32pt" officeooo:rsid="00193e73" officeooo:paragraph-rsid="00193e73" style:font-size-asian="32pt" style:font-size-complex="32pt"/>
    </style:style>
    <style:style style:name="T1" style:family="text">
      <style:text-properties fo:font-size="40pt" style:font-size-asian="40pt" style:font-size-complex="40pt"/>
    </style:style>
    <style:style style:name="T2" style:family="text">
      <style:text-properties fo:font-size="26pt" style:font-size-asian="26pt" style:font-size-complex="26pt"/>
    </style:style>
    <style:style style:name="T3" style:family="text">
      <style:text-properties fo:font-size="44pt" style:font-size-asian="44pt" style:font-size-complex="44pt"/>
    </style:style>
    <style:style style:name="T4" style:family="text">
      <style:text-properties fo:font-size="36pt" style:font-size-asian="36pt" style:font-size-complex="36pt"/>
    </style:style>
    <style:style style:name="T5" style:family="text">
      <style:text-properties style:font-name="Share Tech Mono"/>
    </style:style>
    <style:style style:name="T6" style:family="text">
      <style:text-properties style:font-name="Share Tech Mono" fo:font-size="26pt" style:font-size-asian="26pt" style:font-size-complex="26pt"/>
    </style:style>
    <style:style style:name="T7" style:family="text">
      <style:text-properties fo:font-weight="bold"/>
    </style:style>
    <style:style style:name="T8" style:family="text">
      <style:text-properties fo:font-style="italic"/>
    </style:style>
    <style:style style:name="T9" style:family="text">
      <style:text-properties fo:font-size="24pt" style:font-size-asian="24pt" style:font-size-complex="24pt"/>
    </style:style>
    <style:style style:name="T10" style:family="text">
      <style:text-properties officeooo:rsid="00193e73"/>
    </style:style>
    <style:style style:name="T11" style:family="text">
      <style:text-properties officeooo:rsid="0019a340"/>
    </style:style>
    <style:style style:name="T12" style:family="text">
      <style:text-properties style:font-name="Share Tech Mono"/>
    </style:style>
    <style:style style:name="T13" style:family="text">
      <style:text-properties style:font-name="Share Tech Mono" officeooo:rsid="00193e73"/>
    </style:style>
    <style:style style:name="T14" style:family="text">
      <style:text-properties style:font-name="Share Tech Mono" fo:font-weight="bold"/>
    </style:style>
    <style:style style:name="T15" style:family="text">
      <style:text-properties fo:font-size="21pt" officeooo:rsid="00193e73" style:font-size-asian="21pt" style:font-size-complex="21pt"/>
    </style:style>
    <style:style style:name="T16" style:family="text">
      <style:text-properties fo:font-size="32pt" officeooo:rsid="00193e73" style:font-size-asian="32pt" style:font-size-complex="3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Vex Packet Analyzer<text:line-break/>&lt;Vexor&gt;</text:p>
      <text:p text:style-name="P11"><text:line-break/>Design and Implementation of Custom PCAP <text:s/>Packet Analyze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his project aims to develop a custom network packet analyzer in C for reading PCAP files and analyzing their content at the binary level. The project relies on understanding the file structure, starting from the Global Header, then iterating through Packet Headers and extracting packet-associated data, while organizing the results within a Linked List to facilitate processing and display. The project also includes an initial foundation for a simple intrusion detection engine (Mini-IDS) as an educational and practical step in the field of systems and cybersecurity.</text:p>
      <text:h text:style-name="P1" text:outline-level="1">Project Objectives</text:h>
      <text:p text:style-name="P15">The primary objective of the VEX Packet Analyzer project is to develop a lightweight packet analysis tool capable of parsing and inspecting network packets stored within PCAP files. The project was designed as a practical exercise in low-level programming, binary data processing, and network protocol analysis using the C programming language.</text:p>
      <text:p text:style-name="P15">The main objectives of the project are:</text:p>
      <text:list text:style-name="L1">
        <text:list-item>
          <text:p text:style-name="P16">Understand the internal structure of PCAP files and their binary format.</text:p>
        </text:list-item>
        <text:list-item>
          <text:p text:style-name="P16">Read and validate the PCAP Global Header.</text:p>
        </text:list-item>
        <text:list-item>
          <text:p text:style-name="P16">Extract and process individual packet records from the capture file.</text:p>
        </text:list-item>
        <text:list-item>
          <text:p text:style-name="P16">Parse packet metadata such as timestamps and packet lengths.</text:p>
        </text:list-item>
        <text:list-item>
          <text:p text:style-name="P16">Analyze network protocol headers including Ethernet and IP headers.</text:p>
        </text:list-item>
        <text:list-item>
          <text:p text:style-name="P16">Apply memory-safe programming techniques using structures, pointers, and dynamic memory management.</text:p>
        </text:list-item>
        <text:list-item>
          <text:p text:style-name="P16">Build a foundation for future extensions such as protocol inspection, packet filtering, and intrusion detection capabilities.</text:p>
        </text:list-item>
        <text:list-item>
          <text:p text:style-name="P16">Gain practical experience in systems programming and cybersecurity-oriented software development.</text:p>
        </text:list-item>
      </text:list>
      <text:p text:style-name="P15">This project serves as both a learning platform and a foundation for more advanced packet analysis and network security tools.</text:p>
      <text:p text:style-name="P9"/>
      <text:h text:style-name="P2" text:outline-level="3">System Architecture </text:h>
      <text:p text:style-name="P17"/>
      <text:p text:style-name="P3">The VEX Packet Analyzer architecture is established upon a three-tier pipeline: <text:span text:style-name="T7">Ingestion, Dissection, and Presentation.</text:span> This modular design ensures that the core analysis engine remains decoupled from the data source and the output interface.</text:p>
      <text:p text:style-name="P3"/>
      <text:p text:style-name="P4"/>
      <text:list text:style-name="L2">
        <text:list-item>
          <text:p text:style-name="P5"><text:span text:style-name="T7">Data Ingestion Layer:</text:span> This layer supports dual-input modes: <text:span text:style-name="T8">Offline Parsing</text:span> and <text:span text:style-name="T8">Live Capturing</text:span>. The offline pipeline streams binary data sequentially from standardized PCAP files, validating magic numbers and structural integrity. The live pipeline interfaces directly with network interfaces to harvest raw frames.</text:p>
        </text:list-item>
        <text:list-item>
          <text:p text:style-name="P5"><text:span text:style-name="T7">Protocol Dissection Engine:</text:span> Once a raw packet is ingested, it is pushed into a layered dissection pipeline. The engine decodes the protocol stack top-down, mapping binary payloads into structured formats (Ethernet frames, IP packets, and Transport segments) while ensuring memory safety and preventing buffer overflows.</text:p>
        </text:list-item>
        <text:list-item>
          <text:p text:style-name="P6"><text:span text:style-name="T7">Presentation &amp; Analytics Layer:</text:span> The extracted metadata is processed to generate structured real-time console outputs. It formats network byte orders into human-readable notation (e.g., IPv4 dot-decimal formats) and aggregates runtime statistics for traffic analysis.<text:line-break/></text:p>
        </text:list-item>
      </text:list>
      <text:p text:style-name="P7"/>
      <text:p text:style-name="P4"/>
      <text:p text:style-name="P4"/>
      <text:p text:style-name="P4"/>
      <text:p text:style-name="P4"/>
      <text:p text:style-name="P4"/>
      <text:p text:style-name="P4"/>
      <text:p text:style-name="P4"/>
      <text:p text:style-name="P4"/>
      <text:p text:style-name="P18"><text:span text:style-name="T5">To visualize the execution flow of the three-tier pipeline , </text:span><text:span text:style-name="T14">Figure 1</text:span><text:span text:style-name="T5"> maps out the sequential progression of binary data as it propagates through the system—moving from raw storage retrieval to high-level protocol analysis:<text:line-break/></text:span><text:line-break/><text:span text:style-name="T16">|</text:span></text:p>
      <text:p text:style-name="P19">|</text:p>
      <text:p text:style-name="P19">|<text:line-break/>|</text:p>
      <text:p text:style-name="P19">|</text:p>
      <text:p text:style-name="P19">\/</text:p>
      <text:p text:style-name="P12"/>
      <text:p text:style-name="P13"/>
      <text:p text:style-name="P14"/>
      <text:p text:style-name="P14"/>
      <text:p text:style-name="P14"/>
      <text:p text:style-name="P14">+-------------+</text:p>
      <text:p text:style-name="P14">| <text:s/>PCAP File <text:s/>|</text:p>
      <text:p text:style-name="P14">+-------------+</text:p>
      <text:p text:style-name="P14"><text:s/>|</text:p>
      <text:p text:style-name="P14"><text:s/>v</text:p>
      <text:p text:style-name="P14">+-------------+</text:p>
      <text:p text:style-name="P14">| File Reader |</text:p>
      <text:p text:style-name="P14">+-------------+</text:p>
      <text:p text:style-name="P14"><text:s/>|</text:p>
      <text:p text:style-name="P14"><text:s/>v</text:p>
      <text:p text:style-name="P14">+----------------+</text:p>
      <text:p text:style-name="P14">| Global Header <text:s/>|</text:p>
      <text:p text:style-name="P14">| <text:s text:c="3"/>Parser <text:s text:c="5"/>|</text:p>
      <text:p text:style-name="P14">+----------------+</text:p>
      <text:p text:style-name="P14">|</text:p>
      <text:p text:style-name="P14">v</text:p>
      <text:p text:style-name="P14">+----------------+</text:p>
      <text:p text:style-name="P14">| Packet Header <text:s/>|</text:p>
      <text:p text:style-name="P14">| <text:s text:c="3"/>Parser <text:s text:c="5"/>|</text:p>
      <text:p text:style-name="P14">+----------------+</text:p>
      <text:p text:style-name="P14">|</text:p>
      <text:p text:style-name="P14">v</text:p>
      <text:p text:style-name="P14">+----------------+</text:p>
      <text:p text:style-name="P14">| Packet Payload |</text:p>
      <text:p text:style-name="P14">| <text:s text:c="2"/>Extraction <text:s text:c="2"/>|</text:p>
      <text:p text:style-name="P14">+----------------+</text:p>
      <text:p text:style-name="P14">|</text:p>
      <text:p text:style-name="P14">v</text:p>
      <text:p text:style-name="P14">+----------------+</text:p>
      <text:p text:style-name="P14">| Protocol <text:s text:c="6"/>|</text:p>
      <text:p text:style-name="P14">| Analysis <text:s text:c="6"/>|</text:p>
      <text:p text:style-name="P14">+----------------+</text:p>
      <text:p text:style-name="P14">|</text:p>
      <text:p text:style-name="P14">v</text:p>
      <text:p text:style-name="P14">+----------------+</text:p>
      <text:p text:style-name="P14">| Output Results |</text:p>
      <text:p text:style-name="P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iri" svg:font-family="Amiri" style:font-pitch="variable"/>
    <style:font-face style:name="Amiri Quran" svg:font-family="'Amiri Quran'" style:font-pitch="variable"/>
    <style:font-face style:name="C059" svg:font-family="C059" style:font-pitch="variable"/>
    <style:font-face style:name="Gentium" svg:font-family="Gent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rbitron SemiBold" svg:font-family="'Orbitron SemiBold'" style:font-pitch="variable"/>
    <style:font-face style:name="P052" svg:font-family="P052" style:font-pitch="variable"/>
    <style:font-face style:name="Share Tech Mono" svg:font-family="'Share Tech Mono'" style:font-pitch="variable"/>
    <style:font-face style:name="VT323" svg:font-family="VT323"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9T07:59:29.698390430</meta:creation-date>
    <dc:date>2026-06-20T18:33:44.361376260</dc:date>
    <meta:editing-duration>PT22M</meta:editing-duration>
    <meta:editing-cycles>6</meta:editing-cycles>
    <meta:generator>LibreOffice/24.2.7.2$Linux_X86_64 LibreOffice_project/420$Build-2</meta:generator>
    <meta:document-statistic meta:table-count="0" meta:image-count="0" meta:object-count="0" meta:page-count="5" meta:paragraph-count="62" meta:word-count="549" meta:character-count="3671" meta:non-whitespace-character-count="3165"/>
  </office:meta>
</office:document-meta>
</file>