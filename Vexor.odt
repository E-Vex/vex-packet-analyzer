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052" svg:font-family="P052" style:font-pitch="variable"/>
    <style:font-face style:name="Share Tech Mono" svg:font-family="'Share Tech Mono'" style:font-pitch="variable"/>
  </office:font-face-decls>
  <office:automatic-styles>
    <style:style style:name="P1" style:family="paragraph" style:parent-style-name="Standard">
      <style:paragraph-properties fo:text-align="center" style:justify-single-word="false"/>
      <style:text-properties style:font-name="P052" fo:font-size="48pt" officeooo:rsid="00152e6c" officeooo:paragraph-rsid="00152e6c" style:font-size-asian="42pt" style:font-size-complex="48pt"/>
    </style:style>
    <style:style style:name="P2" style:family="paragraph" style:parent-style-name="Standard">
      <style:paragraph-properties fo:text-align="justify" style:justify-single-word="false"/>
      <style:text-properties style:font-name="P052" fo:font-size="48pt" officeooo:rsid="00152e6c" officeooo:paragraph-rsid="00152e6c" style:font-size-asian="42pt" style:font-size-complex="48pt"/>
    </style:style>
    <style:style style:name="P3" style:family="paragraph" style:parent-style-name="Heading_20_1">
      <style:paragraph-properties fo:text-align="justify" style:justify-single-word="false" fo:break-before="page"/>
      <style:text-properties style:font-name="Share Tech Mono" fo:font-size="22pt" fo:font-weight="bold" officeooo:rsid="00152e6c" officeooo:paragraph-rsid="00152e6c"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Share Tech Mono" fo:font-size="48pt" officeooo:rsid="00152e6c" officeooo:paragraph-rsid="00152e6c" style:font-size-asian="42pt" style:font-size-complex="48pt"/>
    </style:style>
    <style:style style:name="P5" style:family="paragraph" style:parent-style-name="Standard">
      <style:paragraph-properties fo:text-align="justify" style:justify-single-word="false"/>
      <style:text-properties style:font-name="Share Tech Mono" fo:font-size="20pt" fo:font-weight="bold" officeooo:rsid="00152e6c" officeooo:paragraph-rsid="00152e6c" style:font-size-asian="20pt" style:font-weight-asian="bold" style:font-size-complex="20pt" style:font-weight-complex="bold"/>
    </style:style>
    <style:style style:name="P6" style:family="paragraph" style:parent-style-name="Text_20_body">
      <style:text-properties style:font-name="Share Tech Mono" fo:font-size="15pt" style:font-size-asian="15pt" style:font-size-complex="15pt"/>
    </style:style>
    <style:style style:name="P7" style:family="paragraph" style:parent-style-name="Heading_20_1">
      <style:paragraph-properties fo:text-align="start" style:justify-single-word="false" fo:break-before="page"/>
      <style:text-properties style:font-name="Share Tech Mono" fo:font-size="20pt" fo:font-weight="bold" officeooo:rsid="00152e6c" officeooo:paragraph-rsid="00152e6c"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Share Tech Mono" fo:font-size="20pt" fo:font-weight="bold" officeooo:rsid="00152e6c" officeooo:paragraph-rsid="00152e6c" style:font-size-asian="20pt" style:font-weight-asian="bold" style:font-size-complex="20pt" style:font-weight-complex="bold"/>
    </style:style>
    <style:style style:name="P9" style:family="paragraph" style:parent-style-name="Text_20_body" style:list-style-name="L1">
      <style:text-properties style:font-name="Share Tech Mono" fo:font-size="15pt" style:font-size-asian="15pt" style:font-size-complex="15pt"/>
    </style:style>
    <style:style style:name="P10" style:family="paragraph" style:parent-style-name="Text_20_body">
      <style:paragraph-properties fo:text-align="start" style:justify-single-word="false"/>
      <style:text-properties style:font-name="Share Tech Mono" fo:font-size="18pt" style:font-size-asian="18pt" style:font-size-complex="18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44pt" style:font-size-asian="44pt" style:font-size-complex="44pt"/>
    </style:style>
    <style:style style:name="T4" style:family="text">
      <style:text-properties fo:font-size="36pt" style:font-size-asian="36pt" style:font-size-complex="36pt"/>
    </style:style>
    <style:style style:name="T5" style:family="text">
      <style:text-properties style:font-name="Share Tech Mono" fo:font-size="26pt" style:font-size-asian="26pt" style:font-size-complex="26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Vex Packet Analyzer</text:span><text:line-break/><text:span text:style-name="T4">&lt;Vexor&gt;</text:span></text:p>
      <text:p text:style-name="P1"><text:span text:style-name="T1"><text:line-break/></text:span><text:span text:style-name="T5">Design and Implementation of Custom PCAP <text:s/>Packet Analyzer</text:span></text:p>
      <text:p text:style-name="P1"><text:span text:style-name="T2"/></text:p>
      <text:p text:style-name="P1"><text:span text:style-name="T2"/></text:p>
      <text:p text:style-name="P1"><text:span text:style-name="T2"/></text:p>
      <text:p text:style-name="P1"><text:span text:style-name="T2"/></text:p>
      <text:p text:style-name="P2"><text:span text:style-name="T2"/></text:p>
      <text:p text:style-name="P1"><text:span text:style-name="T2"/></text:p>
      <text:p text:style-name="P5">This project aims to develop a custom network packet analyzer in C for reading PCAP files and analyzing their content at the binary level. The project relies on understanding the file structure, starting from the Global Header, then iterating through Packet Headers and extracting packet-associated data, while organizing the results within a Linked List to facilitate processing and display. The project also includes an initial foundation for a simple intrusion detection engine (Mini-IDS) as an educational and practical step in the field of systems and cybersecurity.</text:p>
      <text:h text:style-name="P3" text:outline-level="1">Project Objectives</text:h>
      <text:p text:style-name="P6">The primary objective of the VEX Packet Analyzer project is to develop a lightweight packet analysis tool capable of parsing and inspecting network packets stored within PCAP files. The project was designed as a practical exercise in low-level programming, binary data processing, and network protocol analysis using the C programming language.</text:p>
      <text:p text:style-name="P6">The main objectives of the project are:</text:p>
      <text:list text:style-name="L1">
        <text:list-item>
          <text:p text:style-name="P9">Understand the internal structure of PCAP files and their binary format.</text:p>
        </text:list-item>
        <text:list-item>
          <text:p text:style-name="P9">Read and validate the PCAP Global Header.</text:p>
        </text:list-item>
        <text:list-item>
          <text:p text:style-name="P9">Extract and process individual packet records from the capture file.</text:p>
        </text:list-item>
        <text:list-item>
          <text:p text:style-name="P9">Parse packet metadata such as timestamps and packet lengths.</text:p>
        </text:list-item>
        <text:list-item>
          <text:p text:style-name="P9">Analyze network protocol headers including Ethernet and IP headers.</text:p>
        </text:list-item>
        <text:list-item>
          <text:p text:style-name="P9">Apply memory-safe programming techniques using structures, pointers, and dynamic memory management.</text:p>
        </text:list-item>
        <text:list-item>
          <text:p text:style-name="P9">Build a foundation for future extensions such as protocol inspection, packet filtering, and intrusion detection capabilities.</text:p>
        </text:list-item>
        <text:list-item>
          <text:p text:style-name="P9">Gain practical experience in systems programming and cybersecurity-oriented software development.</text:p>
        </text:list-item>
      </text:list>
      <text:p text:style-name="P6">This project serves as both a learning platform and a foundation for more advanced packet analysis and network security tools.</text:p>
      <text:p text:style-name="P5"/>
      <text:h text:style-name="P7" text:outline-level="1">System Architecture</text:h>
      <text:p text:style-name="P10">The VEX Packet Analyzer follows a layered processing architecture designed to read, validate, and analyze network packets stored within PCAP files.</text:p>
      <text:p text:style-name="P10">The analysis process begins with loading a PCAP file from disk. The file reader module is responsible for accessing the file and providing binary data to the parser.</text:p>
      <text:p text:style-name="P10">The parser first processes the Global Header, which contains metadata describing the capture file format. Once the file is validated, the analyzer iterates through all captured packets sequentially.</text:p>
      <text:p text:style-name="P10">For each packet, the Packet Header is parsed to extract metadata such as timestamps and packet length information. The analyzer then reads the corresponding packet payload and forwards it to the protocol analysis stage.</text:p>
      <text:p text:style-name="P10">During protocol analysis, packet headers such as Ethernet and IP headers are decoded and interpreted. Relevant information is extracted and presented to the user in a human-readable format.</text:p>
      <text:p text:style-name="P10">This modular architecture separates file handling, packet parsing, and protocol analysis into independent stages, improving maintainability and extensibility of the system.</text:p>
      <text:p text:style-name="P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052" svg:font-family="P052" style:font-pitch="variable"/>
    <style:font-face style:name="Share Tech Mono" svg:font-family="'Share Tech Mon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9T07:59:29.698390430</meta:creation-date>
    <dc:date>2026-06-19T08:51:13.114493221</dc:date>
    <meta:editing-duration>PT11M43S</meta:editing-duration>
    <meta:editing-cycles>3</meta:editing-cycles>
    <meta:generator>LibreOffice/24.2.7.2$Linux_X86_64 LibreOffice_project/420$Build-2</meta:generator>
    <meta:document-statistic meta:table-count="0" meta:image-count="0" meta:object-count="0" meta:page-count="4" meta:paragraph-count="22" meta:word-count="431" meta:character-count="2929" meta:non-whitespace-character-count="2526"/>
  </office:meta>
</office:document-meta>
</file>